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master-page-name="HTML">
      <style:paragraph-properties style:page-number="auto"/>
    </style:style>
    <style:style style:name="P2" style:family="paragraph" style:parent-style-name="Text_20_body">
      <style:paragraph-properties fo:margin-left="0.318cm" fo:margin-right="0.318cm" fo:margin-top="0.318cm" fo:margin-bottom="0.318cm" style:contextual-spacing="false" fo:text-indent="0cm" style:auto-text-indent="false"/>
      <style:text-properties fo:background-color="#f0f4f8" loext:padding-left="0.265cm" loext:padding-right="0cm" loext:padding-top="0cm" loext:padding-bottom="0cm" loext:border-left="3pt solid #2f80ed" loext:border-right="none" loext:border-top="none" loext:border-bottom="none"/>
    </style:style>
    <style:style style:name="P3" style:family="paragraph" style:parent-style-name="Heading_20_3">
      <style:paragraph-properties fo:margin-left="0cm" fo:margin-right="0cm" fo:text-indent="0cm" style:auto-text-indent="false"/>
      <style:text-properties loext:padding="0cm" loext:border="none"/>
    </style:style>
    <style:style style:name="P4" style:family="paragraph" style:parent-style-name="Text_20_body" style:list-style-name="L1">
      <style:paragraph-properties fo:margin-top="0.132cm" fo:margin-bottom="0cm" style:contextual-spacing="false"/>
      <style:text-properties loext:padding="0cm" loext:border="none"/>
    </style:style>
    <style:style style:name="P5" style:family="paragraph" style:parent-style-name="Text_20_body" style:list-style-name="L1">
      <style:text-properties loext:padding="0cm" loext:border="none"/>
    </style:style>
    <style:style style:name="P6" style:family="paragraph" style:parent-style-name="Heading_20_3">
      <style:text-properties loext:padding="0cm" loext:border="none"/>
    </style:style>
    <style:style style:name="P7" style:family="paragraph" style:parent-style-name="Text_20_body" style:list-style-name="L2">
      <style:paragraph-properties fo:margin-top="0.132cm" fo:margin-bottom="0cm" style:contextual-spacing="false"/>
      <style:text-properties loext:padding="0cm" loext:border="none"/>
    </style:style>
    <style:style style:name="P8" style:family="paragraph" style:parent-style-name="Text_20_body" style:list-style-name="L2">
      <style:text-properties loext:padding="0cm" loext:border="none"/>
    </style:style>
    <style:style style:name="P9" style:family="paragraph" style:parent-style-name="Text_20_body" style:list-style-name="L3">
      <style:paragraph-properties fo:margin-top="0.132cm" fo:margin-bottom="0cm" style:contextual-spacing="false"/>
      <style:text-properties loext:padding="0cm" loext:border="none"/>
    </style:style>
    <style:style style:name="P10" style:family="paragraph" style:parent-style-name="Text_20_body" style:list-style-name="L3">
      <style:text-properties loext:padding="0cm" loext:border="none"/>
    </style:style>
    <style:style style:name="P11" style:family="paragraph" style:parent-style-name="Text_20_body" style:list-style-name="L4">
      <style:paragraph-properties fo:margin-top="0.132cm" fo:margin-bottom="0cm" style:contextual-spacing="false"/>
      <style:text-properties loext:padding="0cm" loext:border="none"/>
    </style:style>
    <style:style style:name="P12" style:family="paragraph" style:parent-style-name="Text_20_body" style:list-style-name="L4">
      <style:text-properties loext:padding="0cm" loext:border="none"/>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list-style-name="L5">
      <style:paragraph-properties fo:margin-top="0.132cm" fo:margin-bottom="0cm" style:contextual-spacing="false"/>
    </style:style>
    <style:style style:name="P15" style:family="paragraph" style:parent-style-name="Text_20_body" style:list-style-name="L5"/>
    <style:style style:name="P16" style:family="paragraph" style:parent-style-name="Text_20_body" style:list-style-name="L6">
      <style:paragraph-properties fo:margin-top="0.132cm" fo:margin-bottom="0cm" style:contextual-spacing="false"/>
    </style:style>
    <style:style style:name="P17" style:family="paragraph" style:parent-style-name="Text_20_body" style:list-style-name="L6"/>
    <style:style style:name="P18" style:family="paragraph" style:parent-style-name="Text_20_body" style:list-style-name="L7">
      <style:paragraph-properties fo:margin-top="0.132cm" fo:margin-bottom="0cm" style:contextual-spacing="false"/>
    </style:style>
    <style:style style:name="P19" style:family="paragraph" style:parent-style-name="Text_20_body" style:list-style-name="L7"/>
    <style:style style:name="P20" style:family="paragraph" style:parent-style-name="Text_20_body" style:list-style-name="L8">
      <style:paragraph-properties fo:margin-top="0.132cm" fo:margin-bottom="0cm" style:contextual-spacing="false"/>
    </style:style>
    <style:style style:name="P21" style:family="paragraph" style:parent-style-name="Text_20_body" style:list-style-name="L8"/>
    <style:style style:name="P22" style:family="paragraph" style:parent-style-name="Text_20_body" style:list-style-name="L9">
      <style:paragraph-properties fo:margin-top="0.132cm" fo:margin-bottom="0cm" style:contextual-spacing="false"/>
    </style:style>
    <style:style style:name="P23" style:family="paragraph" style:parent-style-name="Text_20_body" style:list-style-name="L9"/>
    <style:style style:name="T1" style:family="text">
      <style:text-properties fo:color="#102a43" loext:opacity="100%" fo:font-weight="bold"/>
    </style:style>
    <style:style style:name="T2" style:family="text">
      <style:text-properties fo:color="#52606d" loext:opacity="100%" fo:font-style="itali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KABRE THEODORE</text:h>
      <text:p text:style-name="Corps_20_de_20_texte.subtitle">Développeur Full-Stack JavaScript / ERP / Automatisation métier</text:p>
      <text:p text:style-name="Corps_20_de_20_texte.contact">Téléphone : à compléter | Email : à compléter | Localisation : à compléter<text:line-break/>GitHub : à compléter | LinkedIn : à compléter </text:p>
      <text:p text:style-name="P2">Développeur full-stack orienté solutions métier, spécialisé dans la conception et l'amélioration d'applications ERP, d'API backend, de tableaux de bord web et de processus de déploiement Docker. Expérience récente sur ParabellumGroups ERP avec un travail complet sur le module comptabilité, les permissions système, les migrations Prisma, la documentation technique et la préparation au déploiement VPS. </text:p>
      <text:h text:style-name="Heading_20_2" text:outline-level="2">Compétences clés</text:h>
      <text:h text:style-name="P3" text:outline-level="3">Backend</text:h>
      <text:list text:style-name="L1">
        <text:list-item>
          <text:p text:style-name="P4">Node.js, Express.js, API REST </text:p>
        </text:list-item>
        <text:list-item>
          <text:p text:style-name="P4">Prisma ORM, migrations Prisma </text:p>
        </text:list-item>
        <text:list-item>
          <text:p text:style-name="P4">PostgreSQL </text:p>
        </text:list-item>
        <text:list-item>
          <text:p text:style-name="P4">Permissions RBAC </text:p>
        </text:list-item>
        <text:list-item>
          <text:p text:style-name="P4">Validation métier côté serveur </text:p>
        </text:list-item>
        <text:list-item>
          <text:p text:style-name="P5">Architecture microservices </text:p>
        </text:list-item>
      </text:list>
      <text:h text:style-name="P6" text:outline-level="3">Frontend</text:h>
      <text:list text:style-name="L2">
        <text:list-item>
          <text:p text:style-name="P7">Next.js, React, TypeScript </text:p>
        </text:list-item>
        <text:list-item>
          <text:p text:style-name="P7">TanStack Query </text:p>
        </text:list-item>
        <text:list-item>
          <text:p text:style-name="P7">Interfaces de gestion ERP </text:p>
        </text:list-item>
        <text:list-item>
          <text:p text:style-name="P7">Tableaux de bord comptables </text:p>
        </text:list-item>
        <text:list-item>
          <text:p text:style-name="P8">Formulaires métier et intégration API </text:p>
        </text:list-item>
      </text:list>
      <text:h text:style-name="P3" text:outline-level="3">DevOps et déploiement</text:h>
      <text:list text:style-name="L3">
        <text:list-item>
          <text:p text:style-name="P9">Docker, Docker Compose </text:p>
        </text:list-item>
        <text:list-item>
          <text:p text:style-name="P9">Déploiement sur VPS Linux </text:p>
        </text:list-item>
        <text:list-item>
          <text:p text:style-name="P9">Git, build et relance de services </text:p>
        </text:list-item>
        <text:list-item>
          <text:p text:style-name="P9">Logs, conteneurs et migrations </text:p>
        </text:list-item>
        <text:list-item>
          <text:p text:style-name="P10">Documentation de commandes de production </text:p>
        </text:list-item>
      </text:list>
      <text:h text:style-name="P6" text:outline-level="3">Comptabilité et ERP</text:h>
      <text:list text:style-name="L4">
        <text:list-item>
          <text:p text:style-name="P11">Plan comptable et familles dynamiques </text:p>
        </text:list-item>
        <text:list-item>
          <text:p text:style-name="P11">Encaissements, décaissements, trésorerie </text:p>
        </text:list-item>
        <text:list-item>
          <text:p text:style-name="P11">Balance comptable et rapports reconstruits </text:p>
        </text:list-item>
        <text:list-item>
          <text:p text:style-name="P11">Notions de plan comptable OHADA </text:p>
        </text:list-item>
        <text:list-item>
          <text:p text:style-name="P12">Analyse critique des risques techniques </text:p>
        </text:list-item>
      </text:list>
      <text:h text:style-name="Heading_20_2" text:outline-level="2">Expérience projet principale</text:h>
      <text:h text:style-name="Heading_20_3" text:outline-level="3">ParabellumGroups ERP</text:h>
      <text:p text:style-name="P13"><text:span text:style-name="T1">Développeur Full-Stack / Backend / Comptabilité / DevOps</text:span><text:line-break/><text:span text:style-name="T2">Mars 2026 - avril 2026</text:span></text:p>
      <text:p text:style-name="Text_20_body">Projet ERP modulaire destiné à centraliser plusieurs fonctions d'entreprise : comptabilité, facturation, achats, inventaire, clients, projets, RH, communication, analytics et services techniques. </text:p>
      <text:h text:style-name="Heading_20_3" text:outline-level="3">Réalisations principales</text:h>
      <text:list text:style-name="L5">
        <text:list-item>
          <text:p text:style-name="P14">Analyse complète du module comptable existant et identification des risques techniques. </text:p>
        </text:list-item>
        <text:list-item>
          <text:p text:style-name="P14">Sécurisation des familles comptables dynamiques côté backend. </text:p>
        </text:list-item>
        <text:list-item>
          <text:p text:style-name="P14">Ajout d'une validation stricte du type de compte comptable attendu selon la famille. </text:p>
        </text:list-item>
        <text:list-item>
          <text:p text:style-name="P14">Correction d'un bug critique dans la balance comptable lié à une mauvaise variable. </text:p>
        </text:list-item>
        <text:list-item>
          <text:p text:style-name="P14">Ajout d'un diagnostic des familles comptables obligatoires pour identifier les configurations manquantes ou invalides. </text:p>
        </text:list-item>
        <text:list-item>
          <text:p text:style-name="P14">Ajout d'une relation entre les comptes de trésorerie et les comptes comptables via Prisma. </text:p>
        </text:list-item>
        <text:list-item>
          <text:p text:style-name="P14">Création d'une migration SQL pour relier <text:span text:style-name="Strong_20_Emphasis">treasury_accounts</text:span> à <text:span text:style-name="Strong_20_Emphasis">accounting_accounts</text:span>. </text:p>
        </text:list-item>
        <text:list-item>
          <text:p text:style-name="P14">Validation backend des encaissements manuels avec obligation d'utiliser un compte de produit. </text:p>
        </text:list-item>
        <text:list-item>
          <text:p text:style-name="P14">Validation backend des décaissements manuels avec obligation d'utiliser un compte de charge. </text:p>
        </text:list-item>
        <text:list-item>
          <text:p text:style-name="P14">Adaptation des workflows pour utiliser le vrai compte comptable lié à la banque ou à la caisse. </text:p>
        </text:list-item>
        <text:list-item>
          <text:p text:style-name="P14">Création et synchronisation des permissions comptables dédiées. </text:p>
        </text:list-item>
        <text:list-item>
          <text:p text:style-name="P14">Mise à jour des rôles système et des scripts de synchronisation des permissions. </text:p>
        </text:list-item>
        <text:list-item>
          <text:p text:style-name="P14">Mise à jour du frontend pour sélectionner et afficher le compte comptable lié à la trésorerie. </text:p>
        </text:list-item>
        <text:list-item>
          <text:p text:style-name="P15">Documentation des commandes VPS pour migration Prisma, resynchronisation des permissions et vérifications SQL. </text:p>
        </text:list-item>
      </text:list>
      <text:h text:style-name="Heading_20_2" text:outline-level="2">Technologies utilisées</text:h>
      <text:p text:style-name="Text_20_body">JavaScript, TypeScript, Node.js, Express.js, Next.js, React, Prisma ORM, PostgreSQL, Docker, Docker Compose, Git, Linux VPS, REST API, RBAC, HTML, Markdown. </text:p>
      <text:h text:style-name="Heading_20_2" text:outline-level="2">Résultats obtenus</text:h>
      <text:list text:style-name="L6">
        <text:list-item>
          <text:p text:style-name="P16">Module comptable plus sécurisé côté backend. </text:p>
        </text:list-item>
        <text:list-item>
          <text:p text:style-name="P16">Meilleure fiabilité des familles comptables dynamiques. </text:p>
        </text:list-item>
        <text:list-item>
          <text:p text:style-name="P16">Compatibilité avec plusieurs banques et plusieurs caisses. </text:p>
        </text:list-item>
        <text:list-item>
          <text:p text:style-name="P16">Réduction des risques d'erreurs comptables via API. </text:p>
        </text:list-item>
        <text:list-item>
          <text:p text:style-name="P16">Permissions comptables mieux séparées des permissions dépenses/paiements. </text:p>
        </text:list-item>
        <text:list-item>
          <text:p text:style-name="P16">Migration Prisma appliquée et validée. </text:p>
        </text:list-item>
        <text:list-item>
          <text:p text:style-name="P17">Documentation VPS prête pour le déploiement. </text:p>
        </text:list-item>
      </text:list>
      <text:h text:style-name="Heading_20_2" text:outline-level="2">Documentation réalisée</text:h>
      <text:list text:style-name="L7">
        <text:list-item>
          <text:p text:style-name="P18">Rapport d'analyse critique du module comptable. </text:p>
        </text:list-item>
        <text:list-item>
          <text:p text:style-name="P18">Rapport des modifications apportées. </text:p>
        </text:list-item>
        <text:list-item>
          <text:p text:style-name="P18">Tutoriel Docker mis à jour avec commandes VPS. </text:p>
        </text:list-item>
        <text:list-item>
          <text:p text:style-name="P18">Manuel d'utilisation détaillé du logiciel. </text:p>
        </text:list-item>
        <text:list-item>
          <text:p text:style-name="P19">Rapport mensuel d'activité et suivi des heures. </text:p>
        </text:list-item>
      </text:list>
      <text:h text:style-name="Heading_20_2" text:outline-level="2">Formation</text:h>
      <text:p text:style-name="Text_20_body"><text:span text:style-name="Strong_20_Emphasis">Formation :</text:span> à compléter<text:line-break/><text:span text:style-name="Strong_20_Emphasis">Établissement :</text:span> à compléter<text:line-break/><text:span text:style-name="Strong_20_Emphasis">Année :</text:span> à compléter</text:p>
      <text:h text:style-name="Heading_20_2" text:outline-level="2">Langues</text:h>
      <text:list text:style-name="L8">
        <text:list-item>
          <text:p text:style-name="P20">Français : courant </text:p>
        </text:list-item>
        <text:list-item>
          <text:p text:style-name="P21">Anglais : à compléter </text:p>
        </text:list-item>
      </text:list>
      <text:h text:style-name="Heading_20_2" text:outline-level="2">Qualités professionnelles</text:h>
      <text:list text:style-name="L9">
        <text:list-item>
          <text:p text:style-name="P22">Rigueur dans l'analyse technique </text:p>
        </text:list-item>
        <text:list-item>
          <text:p text:style-name="P22">Sens du détail dans les règles métier </text:p>
        </text:list-item>
        <text:list-item>
          <text:p text:style-name="P22">Capacité à documenter clairement </text:p>
        </text:list-item>
        <text:list-item>
          <text:p text:style-name="P22">Autonomie dans le diagnostic et la correction </text:p>
        </text:list-item>
        <text:list-item>
          <text:p text:style-name="P23">Vision full-stack, du frontend jusqu'au déploiement </text:p>
        </text:list-item>
      </text:list>
      <text:p text:style-name="Corps_20_de_20_texte.small">CV généré à partir des travaux réalisés sur ParabellumGroups ERP - avril 202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fr" fo:country="FR" style:font-name-asian="Noto Serif CJK SC"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5%"/>
      <style:text-properties fo:color="#1f2933" loext:opacity="100%" style:font-name="Arial" fo:font-family="Arial, Helvetica, sans-serif" fo:font-size="10.5pt" style:font-name-asian="Arial" style:font-family-asian="Arial, Helvetica, sans-serif" style:font-size-asian="10.5pt" style:font-name-complex="Arial" style:font-family-complex="Arial, Helvetica, sans-serif" style:font-size-complex="10.5pt"/>
    </style:style>
    <style:style style:name="Text_20_body" style:display-name="Text body" style:family="paragraph" style:parent-style-name="Standard" style:class="text">
      <style:paragraph-properties fo:margin-left="0.132cm" fo:margin-right="0.132cm" fo:margin-top="0.132cm" fo:margin-bottom="0.132cm" style:contextual-spacing="false" fo:line-height="115%"/>
    </style:style>
    <style:style style:name="Heading" style:family="paragraph" style:parent-style-name="Standard" style:next-style-name="Text_20_body" style:class="chapter">
      <style:paragraph-properties fo:margin-top="0.423cm" fo:margin-bottom="0.499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106cm" style:contextual-spacing="false"/>
      <style:text-properties fo:text-transform="uppercase" fo:color="#102a43" loext:opacity="100%" style:font-name="Liberation Serif" fo:font-family="'Liberation Serif'" style:font-family-generic="roman" style:font-pitch="variable" fo:font-size="24pt" fo:letter-spacing="normal"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left="0.476cm" fo:margin-right="0.476cm" fo:margin-top="0.476cm" fo:margin-bottom="0.212cm" style:contextual-spacing="false" fo:padding-left="0cm" fo:padding-right="0cm" fo:padding-top="0cm" fo:padding-bottom="0.106cm" fo:border-left="none" fo:border-right="none" fo:border-top="none" fo:border-bottom="0.06pt solid #bcccdc"/>
      <style:text-properties fo:color="#102a43" loext:opacity="100%" style:font-name="Liberation Serif" fo:font-family="'Liberation Serif'" style:font-family-generic="roman" style:font-pitch="variable" fo:font-size="13pt" fo:font-weight="bold" style:font-name-asian="Noto Serif CJK SC" style:font-family-asian="'Noto Serif CJK SC'" style:font-family-generic-asian="system" style:font-pitch-asian="variable" style:font-size-asian="13pt" style:font-weight-asian="bold" style:font-name-complex="Noto Sans Devanagari1" style:font-family-complex="'Noto Sans Devanagari'" style:font-family-generic-complex="system" style:font-pitch-complex="variable" style:font-size-complex="13pt" style:font-weight-complex="bold"/>
    </style:style>
    <style:style style:name="Heading_20_3" style:display-name="Heading 3" style:family="paragraph" style:parent-style-name="Heading" style:next-style-name="Text_20_body" style:default-outline-level="3" style:list-style-name="" style:class="chapter">
      <style:paragraph-properties fo:margin-left="0.318cm" fo:margin-right="0.318cm" fo:margin-top="0.318cm" fo:margin-bottom="0.106cm" style:contextual-spacing="false"/>
      <style:text-properties fo:color="#243b53" loext:opacity="100%" style:font-name="Liberation Serif" fo:font-family="'Liberation Serif'" style:font-family-generic="roman" style:font-pitch="variable" fo:font-size="11.5pt" fo:font-weight="bold" style:font-name-asian="Noto Serif CJK SC" style:font-family-asian="'Noto Serif CJK SC'" style:font-family-generic-asian="system" style:font-pitch-asian="variable" style:font-size-asian="11.5pt" style:font-weight-asian="bold" style:font-name-complex="Noto Sans Devanagari1" style:font-family-complex="'Noto Sans Devanagari'" style:font-family-generic-complex="system" style:font-pitch-complex="variable" style:font-size-complex="11.5pt" style:font-weight-complex="bold"/>
    </style:style>
    <style:style style:name="Corps_20_de_20_texte.subtitle" style:display-name="Corps de texte.subtitle" style:family="paragraph" style:parent-style-name="Text_20_body">
      <style:paragraph-properties fo:margin-top="0.132cm" fo:margin-bottom="0.159cm" style:contextual-spacing="false"/>
      <style:text-properties fo:color="#486581" loext:opacity="100%" fo:font-size="12pt" fo:font-weight="bold" style:font-size-asian="12pt" style:font-weight-asian="bold" style:font-size-complex="12pt" style:font-weight-complex="bold"/>
    </style:style>
    <style:style style:name="Corps_20_de_20_texte.contact" style:display-name="Corps de texte.contact" style:family="paragraph" style:parent-style-name="Text_20_body">
      <style:paragraph-properties fo:margin-top="0.132cm" fo:margin-bottom="0.37cm" style:contextual-spacing="false"/>
      <style:text-properties fo:color="#52606d" loext:opacity="100%" fo:font-size="9.5pt" style:font-size-asian="9.5pt" style:font-size-complex="9.5pt"/>
    </style:style>
    <style:style style:name="Corps_20_de_20_texte.small" style:display-name="Corps de texte.small" style:family="paragraph" style:parent-style-name="Text_20_body">
      <style:text-properties fo:color="#52606d" loext:opacity="100%" fo:font-size="9.5pt" style:font-size-asian="9.5pt" style:font-size-complex="9.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1.499cm" fo:margin-right="1.49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CV - Kabre Theodore</dc:title>
    <meta:document-statistic meta:table-count="0" meta:image-count="0" meta:object-count="0" meta:page-count="1" meta:paragraph-count="77" meta:word-count="608" meta:character-count="4192" meta:non-whitespace-character-count="3657"/>
    <meta:generator>LibreOffice/25.8.6.2$Linux_X86_64 LibreOffice_project/a46b460d1686bb49c718d2ef5f88b83ff2dc4981</meta:generator>
    <meta:user-defined meta:name=""/>
  </office:meta>
</office:document-meta>
</file>